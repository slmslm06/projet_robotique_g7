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color="#EE0000" fo:font-size="22pt" style:font-size-asian="22pt" style:font-size-complex="22pt" style:text-underline-type="single" style:text-underline-style="solid" style:text-underline-width="auto" style:text-underline-mode="continuous"/>
    </style:style>
    <style:style style:name="P2" style:parent-style-name="Paragraphedeliste" style:list-style-name="LFO2" style:family="paragraph">
      <style:text-properties fo:font-size="11pt" style:font-size-asian="11pt" style:font-size-complex="11pt" style:text-underline-type="single" style:text-underline-style="solid" style:text-underline-width="auto" style:text-underline-mode="continuous"/>
    </style:style>
    <style:style style:name="P3" style:parent-style-name="Normal" style:family="paragraph">
      <style:text-properties fo:font-size="11pt" style:font-size-asian="11pt" style:font-size-complex="11pt"/>
    </style:style>
    <style:style style:name="P4" style:parent-style-name="Paragraphedeliste" style:list-style-name="LFO2" style:family="paragraph">
      <style:text-properties fo:font-size="11pt" style:font-size-asian="11pt" style:font-size-complex="11pt" style:text-underline-type="single" style:text-underline-style="solid" style:text-underline-width="auto" style:text-underline-mode="continuous"/>
    </style:style>
    <style:style style:name="P5" style:parent-style-name="Normal" style:family="paragraph">
      <style:text-properties fo:font-size="11pt" style:font-size-asian="11pt" style:font-size-complex="11pt"/>
    </style:style>
    <style:style style:name="P6" style:parent-style-name="Paragraphedeliste" style:list-style-name="LFO2" style:family="paragraph">
      <style:text-properties fo:font-size="11pt" style:font-size-asian="11pt" style:font-size-complex="11pt" style:text-underline-type="single" style:text-underline-style="solid" style:text-underline-width="auto" style:text-underline-mode="continuous"/>
    </style:style>
    <style:style style:name="P7" style:parent-style-name="Paragraphedeliste" style:family="paragraph">
      <style:text-properties fo:font-size="11pt" style:font-size-asian="11pt" style:font-size-complex="11pt"/>
    </style:style>
    <style:style style:name="P8" style:parent-style-name="Paragraphedeliste" style:list-style-name="LFO2" style:family="paragraph">
      <style:text-properties fo:font-size="11pt" style:font-size-asian="11pt" style:font-size-complex="11pt" style:text-underline-type="single" style:text-underline-style="solid" style:text-underline-width="auto" style:text-underline-mode="continuous"/>
    </style:style>
    <style:style style:name="P9" style:parent-style-name="Normal" style:family="paragraph">
      <style:text-properties fo:font-size="11pt" style:font-size-asian="11pt" style:font-size-complex="11pt"/>
    </style:style>
    <style:style style:name="P10" style:parent-style-name="Paragraphedeliste" style:list-style-name="LFO3" style:family="paragraph">
      <style:text-properties fo:font-size="11pt" style:font-size-asian="11pt" style:font-size-complex="11pt"/>
    </style:style>
    <style:style style:name="P11" style:parent-style-name="Paragraphedeliste" style:list-style-name="LFO3" style:family="paragraph">
      <style:text-properties fo:font-size="11pt" style:font-size-asian="11pt" style:font-size-complex="11pt"/>
    </style:style>
    <style:style style:name="P12" style:parent-style-name="Paragraphedeliste" style:family="paragraph">
      <style:text-properties fo:font-weight="bold" style:font-weight-asian="bold" style:font-weight-complex="bold" fo:color="#EE0000" fo:font-size="11pt" style:font-size-asian="11pt" style:font-size-complex="11pt" style:text-underline-type="single" style:text-underline-style="solid" style:text-underline-width="auto" style:text-underline-mode="continuous"/>
    </style:style>
    <style:style style:name="P13" style:parent-style-name="Paragraphedeliste" style:list-style-name="LFO3" style:family="paragraph"/>
    <style:style style:name="T14" style:parent-style-name="Policepardéfaut" style:family="text">
      <style:text-properties fo:font-size="11pt" style:font-size-asian="11pt" style:font-size-complex="11pt"/>
    </style:style>
    <style:style style:name="T15" style:parent-style-name="Policepardéfaut" style:family="text">
      <style:text-properties fo:font-size="11pt" style:font-size-asian="11pt" style:font-size-complex="11pt"/>
    </style:style>
    <style:style style:name="T16" style:parent-style-name="Policepardéfaut" style:family="text">
      <style:text-properties fo:font-size="11pt" style:font-size-asian="11pt" style:font-size-complex="11pt"/>
    </style:style>
    <style:style style:name="T17" style:parent-style-name="Policepardéfaut" style:family="text">
      <style:text-properties fo:font-size="11pt" style:font-size-asian="11pt" style:font-size-complex="11pt"/>
    </style:style>
    <style:style style:name="T18" style:parent-style-name="Policepardéfaut" style:family="text">
      <style:text-properties fo:font-size="11pt" style:font-size-asian="11pt" style:font-size-complex="11pt"/>
    </style:style>
    <style:style style:name="T19" style:parent-style-name="Policepardéfaut" style:family="text">
      <style:text-properties fo:font-size="11pt" style:font-size-asian="11pt" style:font-size-complex="11pt"/>
    </style:style>
    <style:style style:name="T20" style:parent-style-name="Policepardéfaut" style:family="text">
      <style:text-properties fo:font-size="11pt" style:font-size-asian="11pt" style:font-size-complex="11pt"/>
    </style:style>
    <style:style style:name="T21" style:parent-style-name="Policepardéfaut" style:family="text">
      <style:text-properties fo:font-size="11pt" style:font-size-asian="11pt" style:font-size-complex="11pt"/>
    </style:style>
    <style:style style:name="T22" style:parent-style-name="Policepardéfaut" style:family="text">
      <style:text-properties fo:font-weight="bold" style:font-weight-asian="bold" style:font-weight-complex="bold" fo:color="#EE0000" fo:font-size="11pt" style:font-size-asian="11pt" style:font-size-complex="11pt" style:text-underline-type="single" style:text-underline-style="solid" style:text-underline-width="auto" style:text-underline-mode="continuous"/>
    </style:style>
    <style:style style:name="T23" style:parent-style-name="Policepardéfaut" style:family="text">
      <style:text-properties fo:font-size="11pt" style:font-size-asian="11pt" style:font-size-complex="11pt"/>
    </style:style>
    <style:style style:name="T24" style:parent-style-name="Policepardéfaut" style:family="text">
      <style:text-properties fo:font-weight="bold" style:font-weight-asian="bold" style:font-weight-complex="bold" fo:color="#EE0000" fo:font-size="11pt" style:font-size-asian="11pt" style:font-size-complex="11pt" style:text-underline-type="single" style:text-underline-style="solid" style:text-underline-width="auto" style:text-underline-mode="continuous"/>
    </style:style>
    <style:style style:name="P25" style:parent-style-name="Paragraphedeliste" style:list-style-name="LFO3" style:family="paragraph"/>
    <style:style style:name="T26" style:parent-style-name="Policepardéfaut" style:family="text">
      <style:text-properties fo:font-size="11pt" style:font-size-asian="11pt" style:font-size-complex="11pt"/>
    </style:style>
    <style:style style:name="T27" style:parent-style-name="Policepardéfaut" style:family="text">
      <style:text-properties fo:font-size="11pt" style:font-size-asian="11pt" style:font-size-complex="11pt"/>
    </style:style>
    <style:style style:name="T28" style:parent-style-name="Policepardéfaut" style:family="text">
      <style:text-properties fo:font-size="11pt" style:font-size-asian="11pt" style:font-size-complex="11pt"/>
    </style:style>
    <style:style style:name="T29" style:parent-style-name="Policepardéfaut" style:family="text">
      <style:text-properties fo:font-size="11pt" style:font-size-asian="11pt" style:font-size-complex="11pt"/>
    </style:style>
    <style:style style:name="T30" style:parent-style-name="Policepardéfaut" style:family="text">
      <style:text-properties fo:font-size="11pt" style:font-size-asian="11pt" style:font-size-complex="11pt"/>
    </style:style>
    <style:style style:name="T31" style:parent-style-name="Policepardéfaut" style:family="text">
      <style:text-properties fo:font-weight="bold" style:font-weight-asian="bold" style:font-weight-complex="bold" fo:color="#EE0000" fo:font-size="11pt" style:font-size-asian="11pt" style:font-size-complex="11pt" style:text-underline-type="single" style:text-underline-style="solid" style:text-underline-width="auto" style:text-underline-mode="continuous"/>
    </style:style>
    <style:style style:name="P32" style:parent-style-name="Paragraphedeliste" style:family="paragraph">
      <style:text-properties fo:font-size="11pt" style:font-size-asian="11pt" style:font-size-complex="11pt"/>
    </style:style>
    <style:style style:name="P33" style:parent-style-name="Paragraphedeliste" style:list-style-name="LFO2" style:family="paragraph">
      <style:text-properties fo:font-size="11pt" style:font-size-asian="11pt" style:font-size-complex="11pt" style:text-underline-type="single" style:text-underline-style="solid" style:text-underline-width="auto" style:text-underline-mode="continuous"/>
    </style:style>
    <style:style style:name="P34" style:parent-style-name="Paragraphedeliste" style:list-style-name="LFO2" style:family="paragraph">
      <style:text-properties fo:font-style="italic" style:font-style-asian="italic" style:font-style-complex="italic" fo:font-size="11pt" style:font-size-asian="11pt" style:font-size-complex="11pt"/>
    </style:style>
    <style:style style:name="P35" style:parent-style-name="Normal" style:family="paragraph">
      <style:text-properties fo:font-size="11pt" style:font-size-asian="11pt" style:font-size-complex="11pt"/>
    </style:style>
    <style:style style:name="P36" style:parent-style-name="Normal" style:family="paragraph">
      <style:text-properties fo:font-weight="bold" style:font-weight-asian="bold" style:font-weight-complex="bold" fo:color="#EE0000" fo:font-size="11pt" style:font-size-asian="11pt" style:font-size-complex="11pt" style:text-underline-type="single" style:text-underline-style="solid" style:text-underline-width="auto" style:text-underline-mode="continuous"/>
    </style:style>
    <style:style style:name="P37" style:parent-style-name="Paragraphedeliste" style:list-style-name="LFO2" style:family="paragraph">
      <style:text-properties fo:font-style="italic" style:font-style-asian="italic" style:font-style-complex="italic" fo:font-size="11pt" style:font-size-asian="11pt" style:font-size-complex="11pt"/>
    </style:style>
    <style:style style:name="P38" style:parent-style-name="Normal" style:family="paragraph">
      <style:text-properties fo:font-size="11pt" style:font-size-asian="11pt" style:font-size-complex="11pt"/>
    </style:style>
    <style:style style:name="P39" style:parent-style-name="Normal" style:family="paragraph">
      <style:text-properties fo:font-size="11pt" style:font-size-asian="11pt" style:font-size-complex="11pt"/>
    </style:style>
    <style:style style:name="P40" style:parent-style-name="Normal" style:family="paragraph">
      <style:text-properties fo:font-size="11pt" style:font-size-asian="11pt" style:font-size-complex="11pt"/>
    </style:style>
  </office:automatic-styles>
  <office:body>
    <office:text text:use-soft-page-breaks="true">
      <text:p text:style-name="P1">Structure du robot et coque</text:p>
      <text:list text:style-name="LFO2" text:continue-numbering="true">
        <text:list-item>
          <text:p text:style-name="P2">Recherche bibliographique<text:s/></text:p>
        </text:list-item>
      </text:list>
      <text:p text:style-name="P3">Pour commencer les recherche concernant la structure du robot et la coque nous avons utilisées GRABCAD pour se familiariser avec les pieces et les différents types de robot, ensuite le site de l’université d’Evry pour regarder des ancienn concours et prendre connaisance de se qui nous attend. Sur youtube j’ai suivis des tutos solidworks pour différents<text:s/>accessoires et enfin j’ai put tirer des astuces du livre Solidworks 2022 «  Conception détaillée de pieces et d’assemblages 3D »</text:p>
      <text:list text:style-name="LFO2" text:continue-numbering="true">
        <text:list-item>
          <text:p text:style-name="P4">Synthèse</text:p>
        </text:list-item>
      </text:list>
      <text:p text:style-name="P5">J’ai put sur GRABCAD comparer les différents chassis à 3 roues, 4 roues et à chassis, en voyant les différents composants qui<text:s/>constitue le chassis grâce a la touche « explode » qui divise le chassis et met en avant les pieces qui le structure. On a la possibilité de mesurer entre deux faces ou deux point la distance en mm ,<text:s/>ouvrire les chassis, robot ou pieces directement sur solidworks et aussi<text:s/>la<text:s/>possibilité<text:s/>de voir les différentes coupe selon les axes X, Y et Z pour avoir un visuel plus claires des éléments dans le robot. Les vidéos des anicens concours a apporter un regard extérieurs et un analyse des différentes erreurs et point important a travailler. Concernant les videos youtube que j’ai visualiser, on a des tutos bien expliquer sur les différentes étapes a réaliser pour concevoir un accessoir et en complement j’ai put trouver un livre avec des indications plus claires sur les différentes fonction que le logiciels possèdes et leur utilités pour les différentes modélisation que j’avais a réaliser.</text:p>
      <text:list text:style-name="LFO2" text:continue-numbering="true">
        <text:list-item>
          <text:p text:style-name="P6">Liste</text:p>
        </text:list-item>
      </text:list>
      <text:p text:style-name="P7">Nom auteur date</text:p>
      <text:list text:style-name="LFO2" text:continue-numbering="true">
        <text:list-item>
          <text:p text:style-name="P8">Méthodologie</text:p>
        </text:list-item>
      </text:list>
      <text:p text:style-name="P9">Il a fallut que je m’organise de façon stratégique, en reéspectant un ordre de priorité logique :</text:p>
      <text:list text:style-name="LFO3" text:continue-numbering="true">
        <text:list-item>
          <text:p text:style-name="P10">La base du Robot : dans un premier temps l’identification du format du robot est important, optez pour un chassis leger sans trop emcombrement qui auras une mobilitée plus fluides, même idée pour les roues que l’on choisiras selon leur fluidités a réaliser les défis de virage, monter et vitesse dans le parcours.</text:p>
        </text:list-item>
        <text:list-item>
          <text:p text:style-name="P11">Schematiser l’aspect de la coque voulu : La coque est l’un des premiers aspect vue par le jury, les autres groupes et le public, c’est ce qui vas donner une idée sur le type d’équipe qu’ils ont en face d’eux, c’est pour cela qu’ici notre volonter était de créer la suprise en optant pour un aspect robot imaginez<text:s/>qui n’est pas connu,<text:s/>a ca, y ajouter du relief avec des accessoires sur la coque<text:s/>modéliser sur solidworks.<text:s/></text:p>
        </text:list-item>
      </text:list>
      <text:p text:style-name="P12">« photo dessin » ou en annexe</text:p>
      <text:list text:style-name="LFO3" text:continue-numbering="true">
        <text:list-item>
          <text:p text:style-name="P13"><text:span text:style-name="T14">Mesure des dimension contraintes</text:span><text:span text:style-name="T15"> : Le tunnel a une mesure de 50*50cm, le risque ici est de mal<text:s/></text:span><text:span text:style-name="T16">dimensionner</text:span><text:span text:style-name="T17"><text:s/></text:span><text:span text:style-name="T18">nos</text:span><text:span text:style-name="T19"><text:s/>accessoires et<text:s/></text:span><text:span text:style-name="T20">malencontreusement<text:s/></text:span><text:span text:style-name="T21">toucher les paroie, il y’a aussi les roue qui ont une distance a respecter sur le passage du pont qui est calculer<text:s/></text:span><text:span text:style-name="T22">plus haut/bas</text:span><text:span text:style-name="T23">. Les mesures sur le site GRABCAD seront utiles lorsque j’ouvrirais sur Solidworks le chassisn, que la coque seras a modéliser et les deux a assembler.</text:span></text:p>
        </text:list-item>
      </text:list>
      <text:p text:style-name="Paragraphedeliste"><text:span text:style-name="T24">screen du web ?</text:span></text:p>
      <text:soft-page-break/>
      <text:list text:style-name="LFO3" text:continue-numbering="true">
        <text:list-item>
          <text:p text:style-name="P25"><text:span text:style-name="T26">Modélisation de l’assemblage</text:span><text:span text:style-name="T27"> : se seras un exemple de notre envie pour la réalisation final, pour avoir une base sur laquelle s’appuyer et surtout se mettre d’accord<text:s/></text:span><text:span text:style-name="T28">en équipe<text:s/></text:span><text:span text:style-name="T29">sur le rendu final, le placement de tout les élément ( catapulte, carte éléctronique, capteurs ).</text:span><text:span text:style-name="T30"><text:s/></text:span><text:span text:style-name="T31">Screen solidwoks ?</text:span></text:p>
        </text:list-item>
      </text:list>
      <text:p text:style-name="P32"/>
      <text:list text:style-name="LFO2" text:continue-numbering="true">
        <text:list-item>
          <text:p text:style-name="P33">Conception</text:p>
          <text:list text:continue-numbering="true">
            <text:list-item>
              <text:p text:style-name="P34">Structure du chassis </text:p>
            </text:list-item>
          </text:list>
        </text:list-item>
      </text:list>
      <text:p text:style-name="P35">Là<text:s/>on a besoin d’une structure efficace avant tout qui sauras se guider sans probleme, tourner, faire des demi tour et reculer avec facilité, le base plane est un compromis parfaite surtout lorsque l’on prend en compte que la coque serais a poser au dessus du cœur de ce dernier<text:s/>donc que le chassis ne dois pas être trop imposant. Les roues ont tous simplement été choisis par élimination car les chenilles sont définis comme trop encombrante et lentes et les 4 roues on quant a elle une difficulter concernant sa maniabilité pour tourner dans les virages et demi-tour, tandis que les 3 roues semble etre les plus aptes a réaliser le plus proprement le parcours.</text:p>
      <text:p text:style-name="P36">Capteur<text:s/>et catapulte<text:s/>dis plus haut ??</text:p>
      <text:list text:style-name="LFO2" text:continue-numbering="true">
        <text:list-item>
          <text:list>
            <text:list-item>
              <text:p text:style-name="P37">La coque</text:p>
            </text:list-item>
          </text:list>
        </text:list-item>
      </text:list>
      <text:p text:style-name="P38">Les coques sont, certes, utiliser a une fin estethique, mais nous avons ici voulus apporter un coter nouveau, différent, avec une tete de robot qui aurait un aspect abimée,<text:s/>disfonctionnel<text:s/>et<text:s/>qui serais<text:s/>même<text:s/>sous estimez,<text:s/>on viens y<text:s/>apporter du volume et du mouvement<text:s/>à l’aide<text:s/>de<text:s/>ressort<text:s/>et <text:s/>vis modéliser sur solidworks<text:s/>et imprimer avec le local d’impression 3 D<text:s/>et<text:s/>pour courronner le tout<text:s/>une explosion en relief sur le robot<text:s/>qui seras, comme ca coque, fais à la thermoformeuse.<text:s/>Les creux<text:s/>et<text:s/>imperfections<text:s/>de forme du robot seront<text:s/>fais avec<text:s/>la plieuse, tandis que sont aspect seras fais a la peinture avec cette aspect, sur certains endroit, de rouillée.</text:p>
      <text:p text:style-name="P39">A.N : Lors de l’utilisation de la Thermo formeuse il seras important de ne pas oublier les angles de dépouille pour retirer la forme du patron et surtout faire attention a ce qu’il n’y ait pas de forme avec des chevauchements ou des contre-dépouille qui bloquerait sont retrait.</text:p>
      <text:p text:style-name="P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Aptos" style:font-name-asian="Aptos"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fahim mohamed</meta:initial-creator>
    <dc:creator>fahim mohamed</dc:creator>
    <meta:creation-date>2026-01-22T15:12:00Z</meta:creation-date>
    <dc:date>2026-01-22T20:49:00Z</dc:date>
    <meta:template xlink:href="Normal" xlink:type="simple"/>
    <meta:editing-cycles>2</meta:editing-cycles>
    <meta:editing-duration>PT20220S</meta:editing-duration>
    <meta:document-statistic meta:page-count="2" meta:paragraph-count="9" meta:word-count="750" meta:character-count="4872" meta:row-count="34" meta:non-whitespace-character-count="4131"/>
  </office:meta>
</office:document-meta>
</file>